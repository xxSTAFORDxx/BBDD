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weight="normal"/>
    </style:style>
    <style:style style:name="P4" style:family="paragraph" style:parent-style-name="Text_20_body">
      <style:paragraph-properties style:writing-mode="lr-tb"/>
    </style:style>
    <style:style style:name="P5" style:family="paragraph" style:parent-style-name="Text_20_body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officeooo:rsid="0005622f" officeooo:paragraph-rsid="0005622f" style:text-blinking="false" fo:background-color="transparent" style:font-weight-asian="normal" style:font-weight-complex="normal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weight="normal" officeooo:paragraph-rsid="0007bd0f" style:font-weight-asian="normal" style:font-weight-complex="normal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officeooo:rsid="0005622f" officeooo:paragraph-rsid="0007bd0f" style:text-blinking="false" fo:background-color="transparent" style:font-weight-asian="normal" style:font-weight-complex="normal"/>
    </style:style>
    <style:style style:name="P8" style:family="paragraph" style:parent-style-name="Text_20_body">
      <style:paragraph-properties style:writing-mode="lr-tb"/>
      <style:text-properties officeooo:paragraph-rsid="00091ef5"/>
    </style:style>
    <style:style style:name="P9" style:family="paragraph" style:parent-style-name="Text_20_body">
      <style:paragraph-properties style:writing-mode="lr-tb"/>
      <style:text-properties officeooo:paragraph-rsid="000940b3"/>
    </style:style>
    <style:style style:name="P10" style:family="paragraph" style:parent-style-name="Text_20_body">
      <style:paragraph-properties fo:margin-left="0cm" fo:margin-right="0cm" fo:text-indent="0cm" style:auto-text-indent="false"/>
    </style:style>
    <style:style style:name="P11" style:family="paragraph" style:parent-style-name="Standard">
      <style:paragraph-properties style:writing-mode="lr-tb"/>
      <style:text-properties officeooo:paragraph-rsid="000940b3"/>
    </style:style>
    <style:style style:name="P12" style:family="paragraph" style:parent-style-name="Text_20_body">
      <style:paragraph-properties style:writing-mode="lr-tb"/>
      <style:text-properties fo:font-weight="normal" officeooo:paragraph-rsid="000940b3"/>
    </style:style>
    <style:style style:name="P13" style:family="paragraph" style:parent-style-name="Text_20_body">
      <style:paragraph-properties style:writing-mode="lr-tb"/>
      <style:text-properties officeooo:paragraph-rsid="000950f1"/>
    </style:style>
    <style:style style:name="P14" style:family="paragraph" style:parent-style-name="Text_20_body">
      <style:text-properties officeooo:paragraph-rsid="000950f1"/>
    </style:style>
    <style:style style:name="P15" style:family="paragraph" style:parent-style-name="Text_20_body">
      <style:paragraph-properties fo:margin-left="0cm" fo:margin-right="0cm" fo:margin-top="0cm" fo:margin-bottom="0.353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16" style:family="paragraph" style:parent-style-name="Text_20_body">
      <style:paragraph-properties style:writing-mode="lr-tb"/>
      <style:text-properties officeooo:paragraph-rsid="000ade34"/>
    </style:style>
    <style:style style:name="P17" style:family="paragraph" style:parent-style-name="Standard">
      <style:paragraph-properties style:writing-mode="lr-tb"/>
    </style:style>
    <style:style style:name="P18" style:family="paragraph" style:parent-style-name="Text_20_body">
      <style:paragraph-properties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italic" style:text-underline-style="none" fo:font-weight="bold" officeooo:paragraph-rsid="000ae51a" style:text-blinking="false" fo:background-color="transparent"/>
    </style:style>
    <style:style style:name="P19" style:family="paragraph" style:parent-style-name="Text_20_body">
      <style:paragraph-properties style:writing-mode="lr-tb"/>
      <style:text-properties officeooo:paragraph-rsid="000ae51a"/>
    </style:style>
    <style:style style:name="P20" style:family="paragraph" style:parent-style-name="Text_20_body">
      <style:paragraph-properties style:writing-mode="lr-tb"/>
      <style:text-properties officeooo:paragraph-rsid="000c731a"/>
    </style:style>
    <style:style style:name="T1" style:family="text">
      <style:text-properties fo:font-style="italic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4" style:family="text">
      <style:text-properties officeooo:rsid="00091ef5"/>
    </style:style>
    <style:style style:name="T5" style:family="text">
      <style:text-properties officeooo:rsid="000940b3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Calibri" fo:font-size="12pt" fo:font-style="italic" style:text-underline-style="none" fo:font-weight="bold" style:text-blinking="false" fo:background-color="transparent" loext:char-shading-value="0"/>
    </style:style>
    <style:style style:name="T8" style:family="text">
      <style:text-properties officeooo:rsid="000950f1"/>
    </style:style>
    <style:style style:name="T9" style:family="text">
      <style:text-properties style:font-name="Calibri" fo:font-size="11pt" fo:font-style="italic" fo:font-weight="bold"/>
    </style:style>
    <style:style style:name="T10" style:family="text">
      <style:text-properties officeooo:rsid="000ade34"/>
    </style:style>
    <style:style style:name="T11" style:family="text">
      <style:text-properties officeooo:rsid="000ae51a"/>
    </style:style>
    <style:style style:name="T12" style:family="text">
      <style:text-properties officeooo:rsid="000c731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bookmark text:name="docs-internal-guid-144f5e2b-7fff-4c14-845a-06bc41a767ad"/>🡪 <text:span text:style-name="T1">Collection: students ( university)</text:span> </text:p>
      <text:p text:style-name="P1"/>
      <text:p text:style-name="P3"><text:bookmark text:name="docs-internal-guid-71bc244c-7fff-9033-4ac2-5c4fe7059570"/><text:span text:style-name="T2">1)</text:span><text:span text:style-name="T3"> </text:span><text:span text:style-name="T2">//Buscar els estudiants de gènere masculí</text:span><text:span text:style-name="T3"> </text:span><text:span text:style-name="T2">(2895)</text:span></text:p>
      <text:p text:style-name="P4">db.students.find({gender : ”H”}) .count();</text:p>
      <text:p text:style-name="P4">db.students.countDocuments({ "gender": "H" });</text:p>
      <text:p text:style-name="P5"/>
      <text:p text:style-name="P3"><text:span text:style-name="T2">2)</text:span><text:span text:style-name="T3"> </text:span><text:span text:style-name="T2">//Buscar els estudiants nascuts l'any 1993 (97)</text:span></text:p>
      <text:p text:style-name="P4">db.students.find({birth_year:”1993”}) .count();</text:p>
      <text:p text:style-name="P4">db.students.countDocuments({ "birth_year": 1993 });</text:p>
      <text:p text:style-name="P6"/>
      <text:p text:style-name="P3"><text:span text:style-name="T2">3)</text:span><text:span text:style-name="T3"> </text:span><text:span text:style-name="T2">//Buscar els estudiants de gènere masculí i nascut l'any 1993 (81)</text:span></text:p>
      <text:p text:style-name="P4">db.students.find({ "gender": "H", “birth_year”: “1993” }).count();</text:p>
      <text:p text:style-name="P4">db.students.countDocuments({ "gender": "H", "birth_year": 1993 });</text:p>
      <text:p text:style-name="P7"/>
      <text:p text:style-name="P3"><text:span text:style-name="T2">4)</text:span><text:span text:style-name="T3"> </text:span><text:span text:style-name="T2">//Buscar els estudiants nascuts a la dècada dels 90 (387)</text:span><text:span text:style-name="T3"> </text:span><text:span text:style-name="T2">Vigileu !!!</text:span></text:p>
      <text:p text:style-name="P8">db.students.<text:span text:style-name="T4">find</text:span>({ "birth_year": { "$gte": 1990, "$lte": 1999 } }).<text:span text:style-name="T4">count()</text:span>; </text:p>
      <text:p text:style-name="P4">db.students.countDocuments({ "birth_year": { "$gte": 1990, "$lte": 1999 } });</text:p>
      <text:p text:style-name="P4"/>
      <text:p text:style-name="P3"><text:span text:style-name="T2">5)</text:span><text:span text:style-name="T3"> </text:span><text:span text:style-name="T2">//Buscar els estudiants masculins nascuts a la dècada dels 90 (339)</text:span></text:p>
      <text:p text:style-name="P8">db.students.<text:span text:style-name="T4">find</text:span>({ "gender": "H", "birth_year": { "$gte": 1990, "$lte": 1999 }}).<text:span text:style-name="T4">count()</text:span>; </text:p>
      <text:p text:style-name="P8">db.students.countDocuments({ "gender": "H", "birth_year": { "$gte": 1990, "$lte": 1999 } });</text:p>
      <text:p text:style-name="P8"/>
      <text:p text:style-name="P3"><text:span text:style-name="T2">6)</text:span><text:span text:style-name="T3"> </text:span><text:span text:style-name="T2">//Buscar els estudiants que no han nascut l'any 1985 (3147)</text:span></text:p>
      <text:p text:style-name="P8">db.students.find<text:bookmark text:name="docs-internal-guid-c0ff9643-7fff-5e59-0f61-68b21cd6da75"/>({ publicationYear: { $not: { $lt: 1985 } } }).count();</text:p>
      <text:p text:style-name="P8">db.students.countDocuments({ publicationYear: { $not: { $lt: 1985 } } });</text:p>
      <text:p text:style-name="P1"/>
      <text:p text:style-name="P3"><text:span text:style-name="T2">7)</text:span><text:span text:style-name="T3"> </text:span><text:span text:style-name="T2">//Buscar els estudiants que han nascut l'any 1970, 1980 o 1990 (293)</text:span></text:p>
      <text:p text:style-name="P8">db.students.find({ $or: [{ <text:span text:style-name="T4">birth_year</text:span>: <text:span text:style-name="T4">1970</text:span> },{ <text:span text:style-name="T4">birth_year</text:span>: <text:span text:style-name="T4">1980</text:span> }, { <text:span text:style-name="T4">birth_year</text:span>: <text:span text:style-name="T4">1990</text:span> }</text:p>
      <text:p text:style-name="P8">] }).count();</text:p>
      <text:p text:style-name="P8">db.students.countDocuments<text:bookmark text:name="docs-internal-guid-2a04ce8c-7fff-1c8e-88e3-90e5e601e87e"/>({ $or: [{ <text:span text:style-name="T4">birth_year</text:span>: <text:span text:style-name="T4">1970</text:span> },{ <text:span text:style-name="T4">birth_year</text:span>: <text:span text:style-name="T4">1980</text:span> }, { <text:span text:style-name="T4">birth_year</text:span>: <text:span text:style-name="T4">1990</text:span> }</text:p>
      <text:p text:style-name="P8">] })</text:p>
      <text:p text:style-name="P1"/>
      <text:p text:style-name="P3"><text:span text:style-name="T2">8)</text:span><text:span text:style-name="T3"> </text:span><text:span text:style-name="T2">//Buscar els estudiants nascuts en any parell  (1684)</text:span></text:p>
      <text:p text:style-name="P4">db.students.<text:span text:style-name="T4">find</text:span>({ "birth_year": { "$mod": [2, 0] } }).<text:span text:style-name="T4">count()</text:span>; </text:p>
      <text:p text:style-name="P4">db.students.countDocuments({ "birth_year": { "$mod": [2, 0] } });</text:p>
      <text:p text:style-name="P4"><text:soft-page-break/></text:p>
      <text:p text:style-name="P4"/>
      <text:p text:style-name="P3"><text:span text:style-name="T2">9)</text:span><text:span text:style-name="T3"> </text:span><text:span text:style-name="T2">//Estudiants nascuts a la dècada 70, en any parell i que siguin masculins  (403)</text:span></text:p>
      <text:p text:style-name="P9">db.students.<text:span text:style-name="T4">find({ "gender": "H", "birth_year": { "$gte": 1970, "$lte": 1979, "$mod": [2, 0] } }).</text:span><text:span text:style-name="T5">count()</text:span><text:span text:style-name="T4">; </text:span></text:p>
      <text:p text:style-name="P8">db.students.countDocuments({ "gender": "H", "birth_year": { "$gte": 1970, "$lte": 1979, "$mod": [2, 0] } });</text:p>
      <text:p text:style-name="P8"/>
      <text:p text:style-name="P10"><text:span text:style-name="T2">10)</text:span><text:span text:style-name="T6"> </text:span><text:span text:style-name="T2">//Buscar els estudiants que tinguin telèfon auxiliar</text:span><text:span text:style-name="T6"> </text:span><text:span text:style-name="T2">(679)</text:span></text:p>
      <text:p text:style-name="P9">db.students.find({ "phone_aux": { "$exists": true, "$ne": null } }).<text:span text:style-name="T5">count();</text:span></text:p>
      <text:p text:style-name="P9">db.students.countDocuments({ "phone_aux": { "$exists": true, "$ne": null } });</text:p>
      <text:p text:style-name="P9"/>
      <text:p text:style-name="P11"><text:bookmark text:name="docs-internal-guid-31107970-7fff-1f77-21ae-b07f4482820e"/><text:span text:style-name="T3">🡪 </text:span><text:span text:style-name="T7">Collection books (university)</text:span> </text:p>
      <text:p text:style-name="P9"/>
      <text:p text:style-name="P12"><text:bookmark text:name="docs-internal-guid-f6ac4a7f-7fff-8502-d8ab-34f9b692394a"/><text:span text:style-name="T2">11.-</text:span><text:span text:style-name="T3"> </text:span><text:span text:style-name="T2">//Buscar los libros con el tag html5 (1)</text:span></text:p>
      <text:p text:style-name="P9"><text:bookmark text:name="docs-internal-guid-e94f9de3-7fff-062a-026e-f1444041d53d"/>db.books.find({ "tags": "html5" }).count();<text:line-break/>db.books.countDocuments({ "tags": "html5" }); </text:p>
      <text:p text:style-name="P4"/>
      <text:p text:style-name="P3"><text:span text:style-name="T2">12.-</text:span><text:span text:style-name="T3"> </text:span><text:span text:style-name="T2">//Buscar los libros con el tag html    (6)</text:span></text:p>
      <text:p text:style-name="P9"><text:bookmark text:name="Còpia de docs-internal-guid-e94f9de3-7fff-062a-026e-f1444041d53d 1"/>db.books.find({ "tags": "html" }).count();<text:line-break/>db.books.countDocuments({ "tags": "html" }); </text:p>
      <text:p text:style-name="P1"/>
      <text:p text:style-name="P3"><text:span text:style-name="T2">13.-</text:span><text:span text:style-name="T3"> </text:span><text:span text:style-name="T2">//Buscar los libros con el tag html, html5, css o css3     (14)</text:span></text:p>
      <text:p text:style-name="P13">db.books.find({ "tags": { "$in": ["html", "html5", "css", "css3"] } }).count();</text:p>
      <text:p text:style-name="P14">db.books.countDocuments({ "tags": { "$in": ["html", "html5", "css", "css3"] } }); </text:p>
      <text:p text:style-name="P4"/>
      <text:p text:style-name="P10"><text:span text:style-name="T2">16.-</text:span><text:span text:style-name="T6"> </text:span><text:span text:style-name="T2">//Buscar los libros que tengan el tag 'programming' y 'agile'   (16)</text:span></text:p>
      <text:p text:style-name="P13">db.books.find({ "tags": { "$<text:span text:style-name="T8">all</text:span>": ["<text:span text:style-name="T8">programming</text:span>", "<text:span text:style-name="T8">agile</text:span>"] } }).count();</text:p>
      <text:p text:style-name="P14">db.books.countDocuments({ "tags": { "$<text:span text:style-name="T8">all</text:span>": ["<text:span text:style-name="T8">programming</text:span>", "<text:span text:style-name="T8">agile</text:span>"] } });</text:p>
      <text:p text:style-name="P10"/>
      <text:p text:style-name="P10"/>
      <text:p text:style-name="P10"/>
      <text:p text:style-name="P10"/>
      <text:p text:style-name="P10"/>
      <text:p text:style-name="P15"><text:bookmark text:name="docs-internal-guid-e21feef0-7fff-fa8e-1a5c-e04e5face164"/><text:soft-page-break/>🡪 <text:span text:style-name="T9">Collection: students ( university)</text:span></text:p>
      <text:p text:style-name="P3"><text:span text:style-name="T2">17.-</text:span><text:span text:style-name="T3"> </text:span><text:span text:style-name="T2">//Buscar aquellos estudiantes que no hayan nacido en el año 1970, 1980 o 1990   (2950)</text:span></text:p>
      <text:p text:style-name="P13">db.<text:span text:style-name="T8">students</text:span>.find({ "<text:span text:style-name="T8">birth_year</text:span>": { "$<text:span text:style-name="T8">n</text:span>in": [<text:span text:style-name="T8">1970</text:span>, <text:span text:style-name="T8">1980, 1990</text:span>] } }).count();</text:p>
      <text:p text:style-name="P14">db.<text:span text:style-name="T8">students</text:span>.countDocuments({ "<text:span text:style-name="T8">birth_year</text:span>": { "$<text:span text:style-name="T8">n</text:span>in": [<text:span text:style-name="T8">1970</text:span>, <text:span text:style-name="T8">1980, 1990</text:span>] } }); </text:p>
      <text:p text:style-name="P1"/>
      <text:p text:style-name="P3"><text:span text:style-name="T2">18.-</text:span><text:span text:style-name="T3"> </text:span><text:span text:style-name="T2">//Buscar los estudiantes que no tengan segundo apellido     (421)</text:span></text:p>
      <text:p text:style-name="P13">db.students.find({ "lastname2": null }).<text:span text:style-name="T5">count();</text:span></text:p>
      <text:p text:style-name="P13">db.students.countDocuments({ "lastname2": null }); </text:p>
      <text:p text:style-name="P1"/>
      <text:p text:style-name="P3"><text:span text:style-name="T2">19.-</text:span><text:span text:style-name="T3"> </text:span><text:span text:style-name="T2">//Buscar los estudiantes que tengan teléfono auxiliar y solo un apellido   (71)</text:span></text:p>
      <text:p text:style-name="P16">db.students.find({ "phone_aux": { "$exists": true, "$ne": null}, "lastname2": null }).<text:span text:style-name="T5">count();</text:span></text:p>
      <text:p text:style-name="P16">db.students.countDocuments({ "phone_aux": { "$exists": true, "$ne": null,} , "lastname2": null});</text:p>
      <text:p text:style-name="P1"/>
      <text:p text:style-name="P3"><text:span text:style-name="T2">20.-</text:span><text:span text:style-name="T3"> </text:span><text:span text:style-name="T2">//Buscar los libros escritos por 2 autores  (79)</text:span></text:p>
      <text:p text:style-name="P16">db.<text:span text:style-name="T10">books</text:span>.find({ "author": { "$size": 2 } }).<text:span text:style-name="T5">count();</text:span></text:p>
      <text:p text:style-name="P16">db.books.countDocuments({ "author": { "$size": 2 } }); </text:p>
      <text:p text:style-name="P1"/>
      <text:p text:style-name="P3"><text:span text:style-name="T2">21.-</text:span><text:span text:style-name="T3"> </text:span><text:span text:style-name="T2">//Eliminar los estudiantes con dni asignado a "NULL"    </text:span></text:p>
      <text:p text:style-name="P17"><text:bookmark text:name="docs-internal-guid-1c132f4b-7fff-97ed-f930-813eb717f56b"/>db.students.deleteMany({ <text:span text:style-name="T10">dni</text:span>: “<text:span text:style-name="T10">NULL”</text:span> }) </text:p>
      <text:p text:style-name="P1"/>
      <text:p text:style-name="P10"><text:span text:style-name="T2">22.-</text:span><text:span text:style-name="T6"> </text:span><text:span text:style-name="T2">//Buscar los estudiantes que no tienen dni  </text:span></text:p>
      <text:p text:style-name="P16">db.students.find({ "<text:span text:style-name="T10">dni</text:span>": null }).<text:span text:style-name="T5">count();</text:span></text:p>
      <text:p text:style-name="P16">db.students.countDocuments({ "<text:span text:style-name="T10">dni</text:span>": null });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8"><text:bookmark text:name="Còpia de docs-internal-guid-e21feef0-7fff-fa8e-1a5c-e04e5face164 1"/>🡪 Collection: countries (geography)  </text:p>
      <text:p text:style-name="P18"/>
      <text:p text:style-name="P3"><text:span text:style-name="T2">40.-</text:span><text:span text:style-name="T3"> </text:span><text:span text:style-name="T2">//Mostrar aquellos países cuya moneda es el euro</text:span></text:p>
      <text:p text:style-name="P19">db.countries.find({ "currency": "EUR" }); </text:p>
      <text:p text:style-name="P1"/>
      <text:p text:style-name="P3"><text:span text:style-name="T2">41.-</text:span><text:span text:style-name="T3"> </text:span><text:span text:style-name="T2">//Mostrar aquellos países donde el español es el idioma nativo</text:span></text:p>
      <text:p text:style-name="P20">db.<text:span text:style-name="T11">countrie</text:span>s.find({ "<text:span text:style-name="T12">nativeLanguage</text:span>": “<text:span text:style-name="T12">spa</text:span><text:span text:style-name="T11">”</text:span>})<text:span text:style-name="T5">;</text:span></text:p>
      <text:p text:style-name="P1"/>
      <text:p text:style-name="P10"><text:span text:style-name="T2">42.-</text:span><text:span text:style-name="T6"> </text:span><text:span text:style-name="T2">//Mostrar aquellos países donde el español es lengua oficial</text:span></text:p>
      <text:p text:style-name="P20">db.countries.find({ "languages.spa": "Spanish" });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5T15:48:52.036049600</meta:creation-date>
    <dc:date>2026-05-05T17:48:16.382092700</dc:date>
    <meta:editing-duration>PT18M55S</meta:editing-duration>
    <meta:editing-cycles>1</meta:editing-cycles>
    <meta:document-statistic meta:table-count="0" meta:image-count="0" meta:object-count="0" meta:page-count="4" meta:paragraph-count="69" meta:word-count="578" meta:character-count="4412" meta:non-whitespace-character-count="3860"/>
    <meta:generator>LibreOffice/25.8.5.2$Windows_X86_64 LibreOffice_project/9c8b85f387cc00a89945a79c9e6239f32e450ac2</meta:generator>
  </office:meta>
</office:document-meta>
</file>