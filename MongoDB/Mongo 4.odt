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Arial1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00" loext:opacity="100%" style:font-name="Arial1" fo:font-size="14pt" fo:font-weight="bold" fo:background-color="#000000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00" loext:opacity="100%" style:font-name="Arial1" fo:font-size="14pt" fo:font-weight="normal" officeooo:rsid="0004fb08" officeooo:paragraph-rsid="000549ab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style:font-name="Arial1" fo:font-size="14pt" fo:font-weight="normal" officeooo:rsid="0004fb08" officeooo:paragraph-rsid="00059dbf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style:font-name="Arial1" fo:font-size="14pt" fo:font-weight="bold" officeooo:paragraph-rsid="0004fb08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000000" loext:opacity="100%" style:font-name="Arial1" fo:font-size="14pt" fo:font-weight="normal" officeooo:paragraph-rsid="00059e4f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style:font-name="Arial1" fo:font-size="14pt" fo:font-weight="normal" officeooo:paragraph-rsid="00059dbf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Arial1" fo:font-size="14pt" style:font-size-asian="14pt" style:font-size-complex="14pt"/>
    </style:style>
    <style:style style:name="P9" style:family="paragraph" style:parent-style-name="Standard">
      <style:text-properties style:font-name="Arial1" fo:font-size="14pt" officeooo:paragraph-rsid="000725a4" style:font-size-asian="14pt" style:font-size-complex="14pt"/>
    </style:style>
    <style:style style:name="P10" style:family="paragraph" style:parent-style-name="Standard">
      <style:text-properties fo:font-variant="normal" fo:text-transform="none" fo:color="#000000" loext:opacity="100%" style:text-line-through-style="none" style:text-line-through-type="none" style:font-name="Arial1" fo:font-size="14pt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Arial1" fo:font-size="16pt" style:font-size-asian="16pt" style:font-size-complex="16pt"/>
    </style:style>
    <style:style style:name="P12" style:family="paragraph" style:parent-style-name="Standard">
      <style:text-properties style:font-name="Arial1" fo:font-size="14pt" fo:font-weight="bold" officeooo:rsid="00065bc7" officeooo:paragraph-rsid="00065bc7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Arial1" fo:font-size="14pt" officeooo:rsid="00065bc7" officeooo:paragraph-rsid="000725a4" style:font-size-asian="14pt" style:font-size-complex="14pt"/>
    </style:style>
    <style:style style:name="P14" style:family="paragraph" style:parent-style-name="Standard">
      <style:text-properties fo:font-variant="normal" fo:text-transform="none" fo:color="#000000" loext:opacity="100%" style:text-line-through-style="none" style:text-line-through-type="none" style:font-name="Arial1" fo:font-size="14pt" fo:font-style="normal" style:text-underline-style="none" fo:font-weight="normal" officeooo:rsid="00065bc7" officeooo:paragraph-rsid="000725a4" style:text-blinking="false" fo:background-color="transparent" style:font-size-asian="14pt" style:font-size-complex="14pt"/>
    </style:style>
    <style:style style:name="P15" style:family="paragraph" style:parent-style-name="Standard">
      <style:text-properties style:font-name="Arial1" fo:font-size="14pt" officeooo:rsid="00065bc7" officeooo:paragraph-rsid="00065bc7" style:font-size-asian="14pt" style:font-size-complex="14pt"/>
    </style:style>
    <style:style style:name="P16" style:family="paragraph" style:parent-style-name="Standard">
      <style:text-properties officeooo:paragraph-rsid="00065bc7"/>
    </style:style>
    <style:style style:name="T1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style:text-line-through-style="none" style:text-line-through-type="none" fo:font-family="Arial, sans-serif" fo:font-style="normal" style:text-underline-style="none" style:text-blinking="false" fo:background-color="transparent" loext:char-shading-value="0"/>
    </style:style>
    <style:style style:name="T3" style:family="text">
      <style:text-properties officeooo:rsid="000725a4"/>
    </style:style>
    <style:style style:name="T4" style:family="text">
      <style:text-properties officeooo:rsid="0004fb08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underline-style="none" fo:font-weight="bold" officeooo:rsid="00065bc7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1155cc" loext:opacity="100%" style:text-line-through-style="none" style:text-line-through-type="none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1" fo:font-size="14pt" style:text-underline-style="none" fo:font-weight="bold" style:text-blinking="false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fo:font-family="Arial, sans-serif" fo:font-size="14pt" fo:font-style="normal" style:text-underline-style="none" fo:font-weight="bold" style:text-blinking="false" fo:background-color="transparent" loext:char-shading-value="0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d954e459-7fff-e0bd-1534-07dc4d58ff93"/><text:span text:style-name="T1">— </text:span><text:span text:style-name="T2">Consultes simples</text:span> </text:p>
      <text:p text:style-name="P2"/>
      <text:p text:style-name="P1"/>
      <text:p text:style-name="P1">1)<text:bookmark text:name="docs-internal-guid-3db5e649-7fff-b7b0-447c-79488599a8f3"/> Mostra tots els professors amb la seva especialitat, ordenats alfabèticament per cognom1.</text:p>
      <text:p text:style-name="P1"/>
      <text:p text:style-name="P3">db.professors.aggregate([</text:p>
      <text:p text:style-name="P3">{$project: {_id: 0,especialitat: 1, nom_complet:</text:p>
      <text:p text:style-name="P4">{$concat: ["$nom"," ","$cognom1"," ","$cognom2"]},cognom1: 1}},</text:p>
      <text:p text:style-name="P4">{$sort: {"cognom1": 1}}</text:p>
      <text:p text:style-name="P4">])</text:p>
      <text:p text:style-name="P1"/>
      <text:p text:style-name="P1"/>
      <text:p text:style-name="P1">2) Llista les aules de tipus 'Taller' que tinguin capacitat &gt;= 20.</text:p>
      <text:p text:style-name="P1"/>
      <text:p text:style-name="P4">db.aules.find({</text:p>
      <text:p text:style-name="P4"><text:span text:style-name="T3">observacions</text:span>: "Taller",</text:p>
      <text:p text:style-name="P4">capacitat: {$gte: 20}</text:p>
      <text:p text:style-name="P4">})</text:p>
      <text:p text:style-name="P1"/>
      <text:p text:style-name="P1"/>
      <text:p text:style-name="P5">3) Quants alumnes hi ha per cicle? (usa countDocuments i un filtre per grup.cicle)</text:p>
      <text:p text:style-name="P5"/>
      <text:p text:style-name="P6">db.alumnes.aggregate([</text:p>
      <text:p text:style-name="P6">{$group: {"_id": "$grup.cicle",</text:p>
      <text:p text:style-name="P6"><text:span text:style-name="T3">total: </text:span>{$sum: 1}}}</text:p>
      <text:p text:style-name="P6">]) </text:p>
      <text:p text:style-name="P5"/>
      <text:p text:style-name="P5"/>
      <text:p text:style-name="P5"><text:span text:style-name="T4">4 ) </text:span>Mostra nom, email i nota_mitjana dels 10 alumnes amb nota més alta. Exclou el camp _id.</text:p>
      <text:p text:style-name="P5"/>
      <text:p text:style-name="P7">db.alumnes.aggregate([</text:p>
      <text:p text:style-name="P7">{$sort: { nota_mitjana: -1}},</text:p>
      <text:p text:style-name="P7">{$limit: 10},</text:p>
      <text:p text:style-name="P7">{$project: {_id: 0, nom: 1, email: 1, nota_mitjana: 1}}</text:p>
      <text:p text:style-name="P7">]) </text:p>
      <text:p text:style-name="P5"/>
      <text:p text:style-name="P5"/>
      <text:p text:style-name="P5"><text:span text:style-name="T4">5)</text:span>Llista els mòduls de DAW o DAM, de 1r curs i que siguin obligatoris</text:p>
      <text:p text:style-name="P8"/>
      <text:p text:style-name="P9">db.moduls.find({cicle: {$in:["DAW", "<text:span text:style-name="T3">DAM"</text:span>]},curs:1, <text:span text:style-name="T3">tipus: "</text:span>obligatori"})</text:p>
      <text:p text:style-name="P10"/>
      <text:p text:style-name="P10"/>
      <text:p text:style-name="P11"><text:bookmark text:name="Còpia de docs-internal-guid-d954e459-7fff-e0bd-1534-07dc4d58ff93 2"/><text:soft-page-break/><text:span text:style-name="T5">— </text:span><text:span text:style-name="T6">Inserts i updates</text:span></text:p>
      <text:p text:style-name="P8"/>
      <text:p text:style-name="P8"/>
      <text:p text:style-name="P12">6)</text:p>
      <text:p text:style-name="P12"/>
      <text:p text:style-name="P13"><text:bookmark text:name="docs-internal-guid-7676272d-7fff-b632-203a-a251823be7f6"/><text:span text:style-name="T7"> </text:span><text:span text:style-name="T8">db.empresa.insertOne(</text:span></text:p>
      <text:p text:style-name="P14">{_id:23,nom:"QuantumBitSL",</text:p>
      <text:p text:style-name="P14">sector:"innovacio",</text:p>
      <text:p text:style-name="P14">activa:true,</text:p>
      <text:p text:style-name="P14">telefon:"931000023",</text:p>
      <text:p text:style-name="P13"><text:span text:style-name="T8">email:"</text:span><text:a xlink:type="simple" xlink:href="mailto:info@qbit.cat" text:style-name="Internet_20_link" text:visited-style-name="Visited_20_Internet_20_Link"><text:span text:style-name="T9">info@qbit.cat</text:span></text:a><text:span text:style-name="T8">",</text:span></text:p>
      <text:p text:style-name="P13"><text:span text:style-name="T8">contacte: {nom: "Zoroastre", cognom1: "Zanetti", cognom2: "Zub"}})</text:span> </text:p>
      <text:p text:style-name="P15"/>
      <text:p text:style-name="P12"/>
      <text:p text:style-name="P12"/>
      <text:p text:style-name="P12">7)</text:p>
      <text:p text:style-name="P12"/>
      <text:p text:style-name="P12"><text:bookmark text:name="docs-internal-guid-d799e67c-7fff-126e-4ecb-f5d0d10bbd53"/><text:span text:style-name="T8">db.empresa.updateOne({_id:23},{$set:{sector:"dades i IA"}})</text:span> </text:p>
      <text:p text:style-name="P12"/>
      <text:p text:style-name="P12"/>
      <text:p text:style-name="P12"/>
      <text:p text:style-name="P12">8)</text:p>
      <text:p text:style-name="P12"/>
      <text:p text:style-name="P12"/>
      <text:p text:style-name="P12"/>
      <text:p text:style-name="P12"/>
      <text:p text:style-name="P12">9)</text:p>
      <text:p text:style-name="P12"/>
      <text:p text:style-name="P12"/>
      <text:p text:style-name="P12"/>
      <text:p text:style-name="P12"/>
      <text:p text:style-name="P12">10)</text:p>
      <text:p text:style-name="P12"/>
      <text:p text:style-name="P12"/>
      <text:p text:style-name="P12"/>
      <text:p text:style-name="P12"/>
      <text:p text:style-name="P12">11)</text:p>
      <text:p text:style-name="P12"/>
      <text:p text:style-name="P12"/>
      <text:p text:style-name="P12"/>
      <text:p text:style-name="P12"/>
      <text:p text:style-name="P16"><text:bookmark text:name="Còpia de Còpia de docs-internal-guid-d954e459-7fff-e0bd-1534-07dc4d58ff93 2 1"/><text:span text:style-name="T10">— </text:span><text:bookmark text:name="docs-internal-guid-ef07d28e-7fff-6c5e-4ee2-556c68d4988c"/><text:span text:style-name="T11">Queries sobre arrays i subdocuments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4T16:40:29.456032600</meta:creation-date>
    <dc:date>2026-05-15T15:06:15.443844800</dc:date>
    <meta:editing-duration>PT21H14M4S</meta:editing-duration>
    <meta:editing-cycles>1</meta:editing-cycles>
    <meta:document-statistic meta:table-count="0" meta:image-count="0" meta:object-count="0" meta:page-count="2" meta:paragraph-count="41" meta:word-count="155" meta:character-count="1231" meta:non-whitespace-character-count="1107"/>
    <meta:generator>LibreOffice/25.8.5.2$Windows_X86_64 LibreOffice_project/9c8b85f387cc00a89945a79c9e6239f32e450ac2</meta:generator>
  </office:meta>
</office:document-meta>
</file>