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0b9709" style:text-blinking="false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0c9792" style:text-blinking="false" fo:background-color="transparent" style:font-size-asian="14pt" style:font-weight-asian="normal" style:font-size-complex="14pt" style:font-weight-complex="normal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0d7cf1" style:text-blinking="false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style:text-underline-style="none" fo:font-weight="normal" officeooo:paragraph-rsid="000b9709" style:text-blinking="false" fo:background-color="transparent" style:font-size-asian="14pt" style:font-weight-asian="normal" style:font-size-complex="14pt" style:font-weight-complex="normal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style:text-underline-style="none" fo:font-weight="normal" officeooo:paragraph-rsid="000d7cf1" style:text-blinking="false" fo:background-color="transparent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style:writing-mode="lr-tb"/>
      <style:text-properties style:font-name="Arial1" fo:font-size="14pt" officeooo:paragraph-rsid="000ec582" style:font-size-asian="14pt" style:font-size-complex="14pt"/>
    </style:style>
    <style:style style:name="P8" style:family="paragraph" style:parent-style-name="Text_20_body">
      <style:paragraph-properties style:writing-mode="lr-tb"/>
      <style:text-properties style:font-name="Arial1"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20%"/>
      <style:text-properties fo:color="#000000" loext:opacity="100%" style:font-name="Arial1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0c9792" style:text-blinking="false" fo:background-color="transparent" style:font-weight-asian="normal" style:font-weight-complex="normal"/>
    </style:style>
    <style:style style:name="P1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0ec582" style:text-blinking="false" fo:background-color="transparent" style:font-weight-asian="normal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rsid="000c9792" officeooo:paragraph-rsid="000ec582" style:text-blinking="false" fo:background-color="transparent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Arial1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0ef792" style:text-blinking="false" fo:background-color="transparent" style:font-weight-asian="normal" style:font-weight-complex="normal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rsid="000c9792" officeooo:paragraph-rsid="000ef792" style:text-blinking="false" fo:background-color="transparent" style:font-weight-asian="normal" style:font-weight-complex="normal"/>
    </style:style>
    <style:style style:name="P18" style:family="paragraph" style:parent-style-name="Text_20_body">
      <style:text-properties style:font-name="Arial1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0a84f" style:text-blinking="false" fo:background-color="transparent" style:font-weight-asian="normal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style:text-underline-style="none" fo:font-weight="normal" officeooo:paragraph-rsid="0010a84f" style:text-blinking="false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0a84f" style:text-blinking="false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0a84f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0a84f" style:text-blinking="false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.35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4pt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cm" fo:margin-bottom="0.35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italic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204c5" style:text-blinking="false" fo:background-color="transparent" style:font-weight-asian="normal" style:font-weight-complex="normal"/>
    </style:style>
    <style:style style:name="P2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204c5" style:text-blinking="false" fo:background-color="transparent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paragraph-rsid="001204c5" style:text-blinking="false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style:text-underline-style="none" fo:font-weight="normal" officeooo:paragraph-rsid="001204c5" style:text-blinking="false" fo:background-color="transparent" style:font-size-asian="14pt" style:font-weight-asian="normal" style:font-size-complex="14pt" style:font-weight-complex="normal"/>
    </style:style>
    <style:style style:name="P3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204c5" style:text-blinking="false" fo:background-color="transparent" style:font-size-asian="14pt" style:font-weight-asian="normal" style:font-size-complex="14pt" style:font-weight-complex="normal"/>
    </style:style>
    <style:style style:name="P3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204c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20bb1" style:text-blinking="false" fo:background-color="transparent" style:font-style-asian="normal" style:font-weight-asian="normal" style:font-style-complex="normal" style:font-weight-complex="normal"/>
    </style:style>
    <style:style style:name="P3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337f3" style:text-blinking="false" fo:background-color="transparent" style:font-weight-asian="normal" style:font-weight-complex="normal"/>
    </style:style>
    <style:style style:name="P3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337f3" style:text-blinking="false" fo:background-color="transparent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rsid="001337f3" officeooo:paragraph-rsid="001337f3" style:text-blinking="false" fo:background-color="transparent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337f3" style:text-blinking="false" fo:background-color="transparent" style:font-size-asian="14pt" style:font-weight-asian="normal" style:font-size-complex="14pt" style:font-weight-complex="normal"/>
    </style:style>
    <style:style style:name="P3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style:font-name="Arial1" fo:font-size="14pt" fo:font-weight="normal" officeooo:paragraph-rsid="001337f3" style:font-size-asian="14pt" style:font-weight-asian="normal" style:font-size-complex="14pt" style:font-weight-complex="normal"/>
    </style:style>
    <style:style style:name="P3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1337f3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16c6"/>
    </style:style>
    <style:style style:name="T2" style:family="text">
      <style:text-properties fo:font-style="normal"/>
    </style:style>
    <style:style style:name="T3" style:family="text">
      <style:text-properties fo:font-style="normal" officeooo:rsid="000c9792"/>
    </style:style>
    <style:style style:name="T4" style:family="text">
      <style:text-properties officeooo:rsid="000c9792"/>
    </style:style>
    <style:style style:name="T5" style:family="text">
      <style:text-properties officeooo:rsid="000d7cf1"/>
    </style:style>
    <style:style style:name="T6" style:family="text">
      <style:text-properties officeooo:rsid="000ef792"/>
    </style:style>
    <style:style style:name="T7" style:family="text">
      <style:text-properties officeooo:rsid="000ec582"/>
    </style:style>
    <style:style style:name="T8" style:family="text">
      <style:text-properties officeooo:rsid="0010a84f"/>
    </style:style>
    <style:style style:name="T9" style:family="text">
      <style:text-properties fo:font-style="normal" officeooo:rsid="0010a84f"/>
    </style:style>
    <style:style style:name="T10" style:family="text">
      <style:text-properties fo:font-style="italic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officeooo:rsid="001204c5"/>
    </style:style>
    <style:style style:name="T14" style:family="text">
      <style:text-properties fo:font-style="normal" officeooo:rsid="001204c5"/>
    </style:style>
    <style:style style:name="T15" style:family="text">
      <style:text-properties officeooo:rsid="00120bb1"/>
    </style:style>
    <style:style style:name="T16" style:family="text">
      <style:text-properties officeooo:rsid="001337f3"/>
    </style:style>
    <style:style style:name="T17" style:family="text">
      <style:text-properties style:font-style-asian="normal" style:font-style-complex="normal"/>
    </style:style>
    <style:style style:name="T18" style:family="text">
      <style:text-properties officeooo:rsid="0010a84f" style:font-style-asian="normal" style:font-style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20bb1" style:text-blinking="false" fo:background-color="transparent" loext:char-shading-value="0" style:font-style-asian="normal" style:font-style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337f3" style:text-blinking="false" fo:background-color="transparent" loext:char-shading-value="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bookmark text:name="docs-internal-guid-47a56272-7fff-f20b-197d-4406f58d40ca"/>90) digues les 10 pel·lícules millor puntuades (viewrating)</text:p>
      <text:p text:style-name="P1"/>
      <text:p text:style-name="P2">db.movies.aggregate([</text:p>
      <text:p text:style-name="P2">{$sort: {"viewerRating": -1}}, </text:p>
      <text:p text:style-name="P3">{$limit:<text:span text:style-name="T1">10</text:span>},</text:p>
      <text:p text:style-name="P4">{$project: { "title": 1,</text:p>
      <text:p text:style-name="P4">"viewerRating": 1,</text:p>
      <text:p text:style-name="P4">"_id": 0}}]); </text:p>
      <text:p text:style-name="P3">])</text:p>
      <text:p text:style-name="P3"/>
      <text:p text:style-name="P3"/>
      <text:p text:style-name="P1">91) digues el títol, any i puntuació de les 10 pel·lícules millor valorades</text:p>
      <text:p text:style-name="P1"/>
      <text:p text:style-name="P4">db.movies.aggregate([</text:p>
      <text:p text:style-name="P4">{$sort: {"viewerRating": -1}},</text:p>
      <text:p text:style-name="P4">{$limit:10},</text:p>
      <text:p text:style-name="P4">{$project: {"_id": 0,</text:p>
      <text:p text:style-name="P4">"titol": "$title",</text:p>
      <text:p text:style-name="P4">"any": "$year",</text:p>
      <text:p text:style-name="P4">"puntuacio": "$viewerRating"}}</text:p>
      <text:p text:style-name="P4">]); </text:p>
      <text:p text:style-name="P1"/>
      <text:p text:style-name="P1"/>
      <text:p text:style-name="P1">91) digues per cada director, quantes pel·lícules ha fet</text:p>
      <text:p text:style-name="P1"/>
      <text:p text:style-name="P2">db.movies.aggregate([</text:p>
      <text:p text:style-name="P4">{$group:{"_id":"$director",</text:p>
      <text:p text:style-name="P4">num_pelis:{$sum:1}}}</text:p>
      <text:p text:style-name="P2">])</text:p>
      <text:p text:style-name="P1"/>
      <text:p text:style-name="P1"/>
      <text:p text:style-name="P1"/>
      <text:p text:style-name="P1"><text:soft-page-break/></text:p>
      <text:p text:style-name="P1"/>
      <text:p text:style-name="P1">92) digues per cada director, quantes pel·lícules ha fet, la puntuació mitjana, la millor puntuació i la pitjor puntuació</text:p>
      <text:p text:style-name="P1"/>
      <text:p text:style-name="P2">db.movies.aggregate([</text:p>
      <text:p text:style-name="P2">{$group:{"_id":"$director", </text:p>
      <text:p text:style-name="P5">        <text:span text:style-name="T2">num_pelis:{$sum:1}, </text:span></text:p>
      <text:p text:style-name="P5">        <text:span text:style-name="T2">promig:{$avg:"$view</text:span><text:span text:style-name="T3">er</text:span><text:span text:style-name="T2">Rating"},</text:span></text:p>
      <text:p text:style-name="P2">maxim: {$max:"$view<text:span text:style-name="T4">er</text:span>Rating"},</text:p>
      <text:p text:style-name="P6"><text:span text:style-name="T5">minim</text:span>:{$<text:span text:style-name="T5">min</text:span>:"$view<text:span text:style-name="T4">er</text:span>Rating"},</text:p>
      <text:p text:style-name="P2">pelis:{$push:"$title"}}}</text:p>
      <text:p text:style-name="P2">])</text:p>
      <text:p text:style-name="P1"/>
      <text:p text:style-name="P1"/>
      <text:p text:style-name="P1">93) digues les pel·lícules de l’any 2000 amb puntuació superior a 5, ordenades títol</text:p>
      <text:p text:style-name="P1"/>
      <text:p text:style-name="P7">db.movies.aggregate([</text:p>
      <text:p text:style-name="P7">{$match: {"year": 2000,</text:p>
      <text:p text:style-name="P7">"viewerRating": { "$gt": 5 }}},</text:p>
      <text:p text:style-name="P7">{$sort: { "title": 1 }}, </text:p>
      <text:p text:style-name="P7">{$project: {"_id": 0,</text:p>
      <text:p text:style-name="P7">"titol": "$title",</text:p>
      <text:p text:style-name="P8">"any": "$year"}}</text:p>
      <text:p text:style-name="P8">]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94) de les pel·lícules que tenen mpaaRating, digues la 5 millor puntuada</text:p>
      <text:p text:style-name="P1"/>
      <text:p text:style-name="P9"><text:bookmark text:name="docs-internal-guid-e6d60c62-7fff-30af-f1f7-be2c20e866ae"/>db.moviesRemote.aggregate ([ </text:p>
      <text:p text:style-name="P10">{$match: {"mpaaRating":{$exists:true}}},</text:p>
      <text:p text:style-name="P10">{$sort:{"viewerRating":-1}},</text:p>
      <text:p text:style-name="P10">{$limit:5},</text:p>
      <text:p text:style-name="P10">{$skip:4}</text:p>
      <text:p text:style-name="P10">])</text:p>
      <text:p text:style-name="P11"/>
      <text:p text:style-name="P1"/>
      <text:p text:style-name="P1">95) per cada any, indica quantes pel·lícules hi ha amb 3 actors o més</text:p>
      <text:p text:style-name="P1"/>
      <text:p text:style-name="P12">db.movies.aggregate([</text:p>
      <text:p text:style-name="P12">{$match: {"cast.2": {$exists:true}}<text:span text:style-name="T4">}</text:span></text:p>
      <text:p text:style-name="P13">{$group:{"<text:span text:style-name="T6">_id”</text:span>: "$<text:span text:style-name="T7">year</text:span>",</text:p>
      <text:p text:style-name="P14">num_peliculas: { "$sum": 1}}}</text:p>
      <text:p text:style-name="P12">])</text:p>
      <text:p text:style-name="P1"/>
      <text:p text:style-name="P1"/>
      <text:p text:style-name="P1">96) de cada gènere i any, quantes pel·lícules hi ha</text:p>
      <text:p text:style-name="P15"/>
      <text:p text:style-name="P16">db.movies.aggregate([</text:p>
      <text:p text:style-name="P16">{$group:{"<text:span text:style-name="T6">_id</text:span>": <text:span text:style-name="T8">{</text:span><text:span text:style-name="T6">genre: </text:span>"$<text:span text:style-name="T6">genre</text:span>",</text:p>
      <text:p text:style-name="P16"><text:span text:style-name="T7">any</text:span>:"$<text:span text:style-name="T7">year</text:span>"<text:span text:style-name="T6">}</text:span>,</text:p>
      <text:p text:style-name="P17">num_peliculas: { "$sum": 1}}}</text:p>
      <text:p text:style-name="P16">])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">EXERCICIS Aggregation Framework amb unwind i push:</text:p>
      <text:p text:style-name="P18"/>
      <text:p text:style-name="P1">100) //mostrar, per cada actor, el número de pel·lícules en que ha participat, duració mitja, més llarga, més curta, juntament amb la llista de pel·lícules.</text:p>
      <text:p text:style-name="P1"/>
      <text:p text:style-name="P19">db.movies.aggregate([</text:p>
      <text:p text:style-name="P19">{$unwind:"$cast"},</text:p>
      <text:p text:style-name="P19">{$group:{"_id":"$cast",</text:p>
      <text:p text:style-name="P19">n<text:span text:style-name="T8">um_</text:span>pelis:{$sum:1},</text:p>
      <text:p text:style-name="P20"><text:span text:style-name="T9">duracio_</text:span><text:span text:style-name="T2">promig:{$avg:"$</text:span><text:span text:style-name="T9">runtime</text:span><text:span text:style-name="T2">"},</text:span></text:p>
      <text:p text:style-name="P21"><text:span text:style-name="T8">duracio_</text:span>maxim<text:span text:style-name="T8">a</text:span>: {$max:"$<text:span text:style-name="T8">runtime</text:span>"},</text:p>
      <text:p text:style-name="P22"><text:span text:style-name="T8">duracio_</text:span><text:span text:style-name="T5">minim</text:span><text:span text:style-name="T8">a</text:span>: {$<text:span text:style-name="T5">min</text:span>:"$<text:span text:style-name="T8">runtime</text:span>"},</text:p>
      <text:p text:style-name="P23"><text:span text:style-name="T8">llista_pelis: </text:span>{$push:"$title"}<text:span text:style-name="T8">}}</text:span></text:p>
      <text:p text:style-name="P23">])</text:p>
      <text:p text:style-name="P9"/>
      <text:p text:style-name="P1"/>
      <text:p text:style-name="P24">🡪 <text:span text:style-name="T10">Collection: books ( university)</text:span></text:p>
      <text:p text:style-name="P25"/>
      <text:p text:style-name="P15"><text:span text:style-name="T11">101)</text:span><text:span text:style-name="T12"> </text:span><text:span text:style-name="T11">//Per cada any de publicació, saber quants llibres s’han publicat</text:span></text:p>
      <text:p text:style-name="P1"/>
      <text:p text:style-name="P26">db.<text:span text:style-name="T13">books</text:span>.aggregate([</text:p>
      <text:p text:style-name="P26">{$group:{"_id":"$<text:span text:style-name="T13">publicationYear</text:span>",</text:p>
      <text:p text:style-name="P26">n<text:span text:style-name="T8">um_</text:span><text:span text:style-name="T13">llibres</text:span>:{$sum:1}<text:span text:style-name="T13">}}</text:span></text:p>
      <text:p text:style-name="P27">])</text:p>
      <text:p text:style-name="P1"/>
      <text:p text:style-name="P1"><text:soft-page-break/></text:p>
      <text:p text:style-name="P15"><text:span text:style-name="T11">102)</text:span><text:span text:style-name="T12"> </text:span><text:span text:style-name="T11">//Per cada any de publicació, saber quants i quins llibres s’han publicat</text:span></text:p>
      <text:p text:style-name="P1"/>
      <text:p text:style-name="P26">db.<text:span text:style-name="T13">books</text:span>.aggregate([</text:p>
      <text:p text:style-name="P26">{$group:{"_id":"$<text:span text:style-name="T13">publicationYear</text:span>",</text:p>
      <text:p text:style-name="P26">n<text:span text:style-name="T8">um_</text:span><text:span text:style-name="T13">llibres</text:span>:{$sum:1},</text:p>
      <text:p text:style-name="P27"><text:span text:style-name="T8">llista_</text:span><text:span text:style-name="T13">llibres</text:span><text:span text:style-name="T8">: </text:span>{$push:"$title"}<text:span text:style-name="T8">}}</text:span></text:p>
      <text:p text:style-name="P27">])</text:p>
      <text:p text:style-name="P1"/>
      <text:p text:style-name="P1"/>
      <text:p text:style-name="P15"><text:span text:style-name="T11">103)</text:span><text:span text:style-name="T12"> </text:span><text:span text:style-name="T11">//Per cada tag, saber quants llibres s’han publicat</text:span></text:p>
      <text:p text:style-name="P1"/>
      <text:p text:style-name="P26">db.<text:span text:style-name="T13">books</text:span>.aggregate([</text:p>
      <text:p text:style-name="P26">{$unwind:"$<text:span text:style-name="T13">tags</text:span>"},</text:p>
      <text:p text:style-name="P26">{$group:{"_id":"$<text:span text:style-name="T13">tags</text:span>",</text:p>
      <text:p text:style-name="P26">n<text:span text:style-name="T8">um_</text:span><text:span text:style-name="T13">llibres</text:span>:{$sum:1}<text:span text:style-name="T13">}}</text:span></text:p>
      <text:p text:style-name="P27">])</text:p>
      <text:p text:style-name="P1"/>
      <text:p text:style-name="P1"/>
      <text:p text:style-name="P15"><text:span text:style-name="T11">104)</text:span><text:span text:style-name="T12"> </text:span><text:span text:style-name="T11">//Per cada tag, saber quants llibres s’han publicat, el promig dels preus, preu més alt, preu més baix i llista de títols que tenen el tag.</text:span></text:p>
      <text:p text:style-name="P28"/>
      <text:p text:style-name="P26">db.<text:span text:style-name="T13">books</text:span>.aggregate([</text:p>
      <text:p text:style-name="P26">{$unwind:"$<text:span text:style-name="T13">tags</text:span>"},</text:p>
      <text:p text:style-name="P26">{$group:{"_id":"$<text:span text:style-name="T13">tags</text:span>",</text:p>
      <text:p text:style-name="P26">n<text:span text:style-name="T8">um_</text:span><text:span text:style-name="T13">llibres</text:span>:{$sum:1},</text:p>
      <text:p text:style-name="P29"><text:span text:style-name="T14">preu</text:span><text:span text:style-name="T9">_</text:span><text:span text:style-name="T2">promig:{$avg:"$</text:span><text:span text:style-name="T14">price.msrp</text:span><text:span text:style-name="T2">"},</text:span></text:p>
      <text:p text:style-name="P30"><text:span text:style-name="T13">preu</text:span><text:span text:style-name="T8">_</text:span>maxim: {$max:"$<text:span text:style-name="T13">price.msrp</text:span>"},</text:p>
      <text:p text:style-name="P31"><text:span text:style-name="T13">preu</text:span><text:span text:style-name="T8">_</text:span><text:span text:style-name="T5">minim</text:span>: {$<text:span text:style-name="T5">min</text:span>:"$<text:span text:style-name="T13">price.msrp</text:span>"},</text:p>
      <text:p text:style-name="P27"><text:span text:style-name="T8">llista_</text:span><text:span text:style-name="T13">llibres</text:span><text:span text:style-name="T8">: </text:span>{$push:"$title"}<text:span text:style-name="T8">}}</text:span></text:p>
      <text:p text:style-name="P27">])</text:p>
      <text:p text:style-name="P1"/>
      <text:p text:style-name="P1"/>
      <text:p text:style-name="P1"/>
      <text:p text:style-name="P1"><text:soft-page-break/></text:p>
      <text:p text:style-name="P15"><text:span text:style-name="T11">105)</text:span><text:span text:style-name="T12"> </text:span><text:span text:style-name="T11">El mateix que 104 però solament dels tags que tinguin 4 llibres o més, ordenats per quantitat de llibres ascendent i deixa els resultats a la col·lecció tags4</text:span></text:p>
      <text:p text:style-name="P1"/>
      <text:p text:style-name="P32">db.books.aggregate([</text:p>
      <text:p text:style-name="P32">{$unwind: "$tags"},</text:p>
      <text:p text:style-name="P32">{$group: {"_id": "$tags",</text:p>
      <text:p text:style-name="P32"><text:span text:style-name="T15">n</text:span>um_llibres: {"$sum": 1},</text:p>
      <text:p text:style-name="P32">preu_promig: {"$avg": "$price.msrp"},</text:p>
      <text:p text:style-name="P32">preu_maxim: {"$max": "$price.msrp"},</text:p>
      <text:p text:style-name="P32">preu_minim: {"$min": "$price.msrp"},</text:p>
      <text:p text:style-name="P32"><text:span text:style-name="T15">l</text:span>lista_llibres: {"$push":"$title"}}},</text:p>
      <text:p text:style-name="P32">{$match: {"num_llibres":{"$gte": 4}}},</text:p>
      <text:p text:style-name="P32">{$sort: {"num_llibres": 1}},</text:p>
      <text:p text:style-name="P32">{$out: "tags4"}</text:p>
      <text:p text:style-name="P32">]) </text:p>
      <text:p text:style-name="P1"/>
      <text:p text:style-name="P18"/>
      <text:p text:style-name="P1">Amb la col·lecció countries</text:p>
      <text:p text:style-name="P18"/>
      <text:p text:style-name="P15"><text:span text:style-name="T11">111)</text:span><text:span text:style-name="T12"> </text:span><text:span text:style-name="T11">//Saber, per cada idioma (nativeLanguage), quants països hi ha</text:span></text:p>
      <text:p text:style-name="P1"/>
      <text:p text:style-name="P33">db.<text:span text:style-name="T16">countries</text:span>.aggregate([</text:p>
      <text:p text:style-name="P33">{$group:{"_id":"$<text:span text:style-name="T16">nativeLanguage</text:span>",</text:p>
      <text:p text:style-name="P33">n<text:span text:style-name="T8">um_</text:span><text:span text:style-name="T16">paisos</text:span>:{$sum:1<text:span text:style-name="T17">}</text:span><text:span text:style-name="T18">}}</text:span></text:p>
      <text:p text:style-name="P34">])</text:p>
      <text:p text:style-name="P1"/>
      <text:p text:style-name="P1"/>
      <text:p text:style-name="P1"/>
      <text:p text:style-name="P1"/>
      <text:p text:style-name="P1"/>
      <text:p text:style-name="P1"/>
      <text:p text:style-name="P35"/>
      <text:p text:style-name="P35"><text:soft-page-break/></text:p>
      <text:p text:style-name="P36"><text:span text:style-name="T11">112)</text:span><text:span text:style-name="T12"> </text:span><text:span text:style-name="T11">//Saber, per cada idioma (nativeLanguage) quants països i quins països hi ha</text:span></text:p>
      <text:p text:style-name="P36"/>
      <text:p text:style-name="P37">db.<text:span text:style-name="T16">countries</text:span>.aggregate([</text:p>
      <text:p text:style-name="P37">{$group:{"_id":"$<text:span text:style-name="T16">nativeLanguage</text:span>",</text:p>
      <text:p text:style-name="P37">n<text:span text:style-name="T8">um_</text:span><text:span text:style-name="T16">paisos</text:span>:{$sum:1<text:span text:style-name="T17">}</text:span><text:span text:style-name="T18">,</text:span></text:p>
      <text:p text:style-name="P38"><text:span text:style-name="T19">l</text:span><text:span text:style-name="T20">lista_</text:span><text:span text:style-name="T21">paisos</text:span><text:span text:style-name="T20">: {"$push":"$</text:span><text:span text:style-name="T21">name.common</text:span><text:span text:style-name="T20">"}}},</text:span></text:p>
      <text:p text:style-name="P39">]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16:41:46.243477400</meta:creation-date>
    <dc:date>2026-05-07T19:51:54.673165400</dc:date>
    <meta:editing-duration>PT37M36S</meta:editing-duration>
    <meta:editing-cycles>1</meta:editing-cycles>
    <meta:document-statistic meta:table-count="0" meta:image-count="0" meta:object-count="0" meta:page-count="7" meta:paragraph-count="123" meta:word-count="423" meta:character-count="3768" meta:non-whitespace-character-count="3444"/>
    <meta:generator>LibreOffice/25.8.5.2$Windows_X86_64 LibreOffice_project/9c8b85f387cc00a89945a79c9e6239f32e450ac2</meta:generator>
  </office:meta>
</office:document-meta>
</file>