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</style:style>
    <style:style style:name="P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solid" draw:fill-color="#ffffff"/>
      <style:paragraph-properties fo:margin-top="0cm" fo:margin-bottom="0cm" style:contextual-spacing="false" fo:line-height="138%" fo:background-color="#ffffff"/>
    </style:style>
    <style:style style:name="T1" style:family="text">
      <style:text-properties style:font-name="Arial2" fo:font-size="14pt" fo:font-style="normal" fo:font-weight="bold"/>
    </style:style>
    <style:style style:name="T2" style:family="text">
      <style:text-properties officeooo:rsid="001526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a132ca3f-7fff-2d56-69d0-559b3f7cf82d"/>92) digues per cada director, quantes pel·lícules ha fet, </text:p>
      <text:p text:style-name="P2">    <text:span text:style-name="T1">la puntuació mitjana, la millor puntuació i la pitjor puntuació</text:span></text:p>
      <text:p text:style-name="P3"/>
      <text:p text:style-name="P4">-- 1 agrupar per director</text:p>
      <text:p text:style-name="P3"/>
      <text:p text:style-name="P4">db.movies.aggregate([</text:p>
      <text:p text:style-name="P4">{$group:{"_id":"$director"}}</text:p>
      <text:p text:style-name="P4">])</text:p>
      <text:p text:style-name="P3"/>
      <text:p text:style-name="P4">-- 2 comptem pel·lícules</text:p>
      <text:p text:style-name="P3"/>
      <text:p text:style-name="P4">db.movies.aggregate([</text:p>
      <text:p text:style-name="P4"><text:span text:style-name="T2">d</text:span>{$group:{"_id":"$director", num_pelis:{$sum:1}}}</text:p>
      <text:p text:style-name="P4">])</text:p>
      <text:p text:style-name="P3"/>
      <text:p text:style-name="P4">-- 3 a més, vull saber quines pel·lis ha fet cada director</text:p>
      <text:p text:style-name="P3"/>
      <text:p text:style-name="P4">db.movies.aggregate([</text:p>
      <text:p text:style-name="P4">{$group:{"_id":"$director", num_pelis:{$sum:1}, pelis:{$push:"$title"}}}</text:p>
      <text:p text:style-name="P4">])</text:p>
      <text:p text:style-name="P3"/>
      <text:p text:style-name="P4">-- 4 volem mostrar únicament aquells directors que hagin fet com a mínim 10 pel·lícules</text:p>
      <text:p text:style-name="P3"/>
      <text:p text:style-name="P4">db.movies.aggregate([</text:p>
      <text:p text:style-name="P4">{$group:{"_id":"$director", num_pelis:{$sum:1}, pelis:{$push:"$title"}}},</text:p>
      <text:p text:style-name="P4">{$match:{"num_pelis":{"$gte":10}}}</text:p>
      <text:p text:style-name="P4">])</text:p>
      <text:p text:style-name="P3"/>
      <text:p text:style-name="P4">-- 5 volem limitar la cerca a pel·lícules que hagin tret almenys un 8.0 com a viewRating</text:p>
      <text:p text:style-name="P3"/>
      <text:p text:style-name="P4">db.movies.aggregate([</text:p>
      <text:p text:style-name="P4">{$match:{"viewerRating":{"$gte":8}}},</text:p>
      <text:p text:style-name="P4"><text:soft-page-break/>{$group:{"_id":"$director", num_pelis:{$sum:1}, pelis:{$push:"$title"}}},</text:p>
      <text:p text:style-name="P4">{$match:{"num_pelis":{"$gte":10}}}</text:p>
      <text:p text:style-name="P4">])</text:p>
      <text:p text:style-name="P3"/>
      <text:p text:style-name="P4">-- 6 afegir ara la puntuació mitjana, la millor puntuació </text:p>
      <text:p text:style-name="P3"/>
      <text:p text:style-name="P4">db.movies.aggregate([</text:p>
      <text:p text:style-name="P4">{$match:{"viewerRating":{"$gte":8}}},</text:p>
      <text:p text:style-name="P4">{$group:{"_id":"$director", </text:p>
      <text:p text:style-name="P2">        <text:span text:style-name="T1">num_pelis:{$sum:1}, </text:span></text:p>
      <text:p text:style-name="P2">        <text:span text:style-name="T1">promig:{$avg:"$viewerRating"},</text:span></text:p>
      <text:p text:style-name="P4">maxim: {$max:"$viewerRating"},</text:p>
      <text:p text:style-name="P4">pelis:{$push:"$title"}}},</text:p>
      <text:p text:style-name="P4">{$match:{"num_pelis":{"$gte":10}}}</text:p>
      <text:p text:style-name="P4">])</text:p>
      <text:p text:style-name="P3"/>
      <text:p text:style-name="P4">-- 7 donam els tres directors amb millor puntuació mitjana ordenats alfabèticament</text:p>
      <text:p text:style-name="P3"/>
      <text:p text:style-name="P4">db.movies.aggregate([</text:p>
      <text:p text:style-name="P4">{$match:{"viewerRating":{"$gte":8}}},</text:p>
      <text:p text:style-name="P4">{$group:{"_id":"$director", </text:p>
      <text:p text:style-name="P2">        <text:span text:style-name="T1">num_pelis:{$sum:1}, </text:span></text:p>
      <text:p text:style-name="P2">        <text:span text:style-name="T1">promig:{$avg:"$viewerRating"},</text:span></text:p>
      <text:p text:style-name="P4">maxim: {$max:"$viewerRating"},</text:p>
      <text:p text:style-name="P4">pelis:{$push:"$title"}}},</text:p>
      <text:p text:style-name="P4">{$match:{"num_pelis":{"$gte":10}}},</text:p>
      <text:p text:style-name="P4">{$sort:{"promig":-1}},</text:p>
      <text:p text:style-name="P4">{$limit:3},</text:p>
      <text:p text:style-name="P4">{$sort:{"_id":1}}</text:p>
      <text:p text:style-name="P4">])</text:p>
      <text:p text:style-name="P3"/>
      <text:p text:style-name="P4"><text:soft-page-break/>-- 8 genera una nova col·lecció amb les dades que es digui best_directors</text:p>
      <text:p text:style-name="P3"/>
      <text:p text:style-name="P4">db.movies.aggregate([</text:p>
      <text:p text:style-name="P4">{$match:{"viewerRating":{"$gte":8}}},</text:p>
      <text:p text:style-name="P4">{$group:{"_id":"$director", </text:p>
      <text:p text:style-name="P2">        <text:span text:style-name="T1">num_pelis:{$sum:1}, </text:span></text:p>
      <text:p text:style-name="P2">        <text:span text:style-name="T1">promig:{$avg:"$viewerRating"},</text:span></text:p>
      <text:p text:style-name="P4">maxim: {$max:"$viewerRating"},</text:p>
      <text:p text:style-name="P4">pelis:{$push:"$title"}}},</text:p>
      <text:p text:style-name="P4">{$match:{"num_pelis":{"$gte":10}}},</text:p>
      <text:p text:style-name="P4">{$sort:{"promig":-1}},</text:p>
      <text:p text:style-name="P4">{$limit:3},</text:p>
      <text:p text:style-name="P4">{$sort:{"_id":1}},</text:p>
      <text:p text:style-name="P4">{$out:"best_directors"}</text:p>
      <text:p text:style-name="P4">])</text:p>
      <text:p text:style-name="P3"/>
      <text:p text:style-name="P4"><text:bookmark text:name="docs-internal-guid-f0003ff1-7fff-2834-b938-d809f65e84c6"/>-- unwind</text:p>
      <text:p text:style-name="P3"/>
      <text:p text:style-name="P4">-- vull saber quines pel·lis tenen almenys tres actors</text:p>
      <text:p text:style-name="P3"/>
      <text:p text:style-name="P4">db.movies.aggregate([</text:p>
      <text:p text:style-name="P4">{$match: {"cast.2":{$exists:true}}}</text:p>
      <text:p text:style-name="P4">])</text:p>
      <text:p text:style-name="P3"/>
      <text:p text:style-name="P3"/>
      <text:p text:style-name="P4">-- sé quins actors (cast) han participat a les pel·lis</text:p>
      <text:p text:style-name="P4">però si vull saber quins pel·lis ha fet cada actor no ho sé</text:p>
      <text:p text:style-name="P3"/>
      <text:p text:style-name="P4">-- De les pel·lis que tenen almenys 3 actors, vull saber quines pel·lis ha fet cada actor</text:p>
      <text:p text:style-name="P3"/>
      <text:p text:style-name="P3"/>
      <text:p text:style-name="P4">db.movies.aggregate([</text:p>
      <text:p text:style-name="P4"><text:soft-page-break/>{$match: {"cast.2":{$exists:true}}},</text:p>
      <text:p text:style-name="P4">{$unwind:"$cast"}</text:p>
      <text:p text:style-name="P4">])</text:p>
      <text:p text:style-name="P3"/>
      <text:p text:style-name="P4">db.movies.aggregate([</text:p>
      <text:p text:style-name="P4">{$match: {"cast.2":{$exists:true}}},</text:p>
      <text:p text:style-name="P4">{$unwind:"$cast"},</text:p>
      <text:p text:style-name="P4">{$group:{"_id":"$cast",npelis:{$sum:1},pelis:{$push:"$title"}}}</text:p>
      <text:p text:style-name="P4">])</text:p>
      <text:p text:style-name="P3"/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16:24:29.089484900</meta:creation-date>
    <dc:date>2026-05-07T19:52:21.375597300</dc:date>
    <meta:editing-duration>PT3H1M14S</meta:editing-duration>
    <meta:editing-cycles>1</meta:editing-cycles>
    <meta:document-statistic meta:table-count="0" meta:image-count="0" meta:object-count="0" meta:page-count="4" meta:paragraph-count="80" meta:word-count="235" meta:character-count="2530" meta:non-whitespace-character-count="2313"/>
    <meta:generator>LibreOffice/25.8.5.2$Windows_X86_64 LibreOffice_project/9c8b85f387cc00a89945a79c9e6239f32e450ac2</meta:generator>
  </office:meta>
</office:document-meta>
</file>