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style:writing-mode="lr-tb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 style:list-style-name="L2">
      <style:paragraph-properties style:writing-mode="lr-tb"/>
    </style:style>
    <style:style style:name="P4" style:family="paragraph" style:parent-style-name="Text_20_body" style:list-style-name="L3">
      <style:paragraph-properties style:writing-mode="lr-tb"/>
    </style:style>
    <style:style style:name="P5" style:family="paragraph" style:parent-style-name="Text_20_body" style:list-style-name="L4">
      <style:paragraph-properties style:writing-mode="lr-tb"/>
    </style:style>
    <style:style style:name="P6" style:family="paragraph" style:parent-style-name="Text_20_body">
      <style:paragraph-properties style:writing-mode="lr-tb"/>
      <style:text-properties officeooo:paragraph-rsid="00098fc5"/>
    </style:style>
    <style:style style:name="P7" style:family="paragraph" style:parent-style-name="Text_20_body" style:list-style-name="L5">
      <style:paragraph-properties style:writing-mode="lr-tb"/>
    </style:style>
    <style:style style:name="P8" style:family="paragraph" style:parent-style-name="Text_20_body">
      <style:paragraph-properties style:writing-mode="lr-tb"/>
      <style:text-properties officeooo:paragraph-rsid="000b5760"/>
    </style:style>
    <style:style style:name="T1" style:family="text">
      <style:text-properties officeooo:rsid="00098fc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 text:name="docs-internal-guid-17941057-7fff-63ae-0ff2-9eca2704d12f"/>Digues el title de pel·lícules que tenen tomato i no tenen  metacritic  (potser no hi ha cap)</text:p>
        </text:list-item>
      </text:list>
      <text:p text:style-name="P2">5</text:p>
      <text:list text:style-name="L2">
        <text:list-item>
          <text:p text:style-name="P3">Digues les pel·lícules que tenen 3 o 4  actors al camp actors</text:p>
        </text:list-item>
      </text:list>
      <text:p text:style-name="Text_20_body"/>
      <text:p text:style-name="P2">db.remote.find({</text:p>
      <text:p text:style-name="P2">  $or: [</text:p>
      <text:p text:style-name="P2">    { "actors": { $size: 3 } },</text:p>
      <text:p text:style-name="P2">    { "actors": { $size: 4 } }</text:p>
      <text:p text:style-name="P2">  ]</text:p>
      <text:p text:style-name="P2">})</text:p>
      <text:p text:style-name="Text_20_body"/>
      <text:list text:style-name="L3">
        <text:list-item>
          <text:p text:style-name="P4">Quines pel·lícules han estat dirigides pel director “George Lucas”  abans de 2014. Mostra únicament title, year, genres, imbd.rating. Ordena resultats per title</text:p>
        </text:list-item>
      </text:list>
      <text:p text:style-name="Text_20_body"/>
      <text:p text:style-name="P2">db.remote.find(</text:p>
      <text:p text:style-name="P2"> {"director": "George Lucas","year": { $lt: 2014 }},</text:p>
      <text:p text:style-name="P2"> { _id: 0,title: 1,year: 1,genres: 1, "imdb.rating": 1}).sort({ title: 1 })</text:p>
      <text:p text:style-name="Text_20_body"/>
      <text:list text:style-name="L4">
        <text:list-item>
          <text:p text:style-name="P5">Per cada director  volem saber quantes pel·lícules ha fet i la duració mitjana de les mateixes. Mostra el resultat ordenat per director i duració mitjana (runtime)</text:p>
        </text:list-item>
      </text:list>
      <text:p text:style-name="P2">db.moviesRemote.aggregate(</text:p>
      <text:p text:style-name="P2">{ $unwind: {$director}},</text:p>
      <text:p text:style-name="P2">{$group:{_id: { nom: "$director" },</text:p>
      <text:p text:style-name="P2">    num_peli: { $sum: 1 },</text:p>
      <text:p text:style-name="P2">    dur_avg: { $avg: "$runtime" }</text:p>
      <text:p text:style-name="P2">  }},</text:p>
      <text:p text:style-name="P2">{ $sort: {</text:p>
      <text:p text:style-name="P2">    _id: 1,</text:p>
      <text:p text:style-name="P2">    dur_avg: 1</text:p>
      <text:p text:style-name="P2">}})</text:p>
      <text:p text:style-name="Text_20_body"/>
      <text:p text:style-name="P2">        5. Per cada actor, saber el títol de les pel·lícules que ha fet. Motra nom de l’actor i títol de les pel·lícules únicament. </text:p>
      <text:p text:style-name="P2"><text:soft-page-break/>Deixa els resultats en una col·lecció actors</text:p>
      <text:p text:style-name="P2"/>
      <text:p text:style-name="P6">db.<text:span text:style-name="T1">remote</text:span>.aggregate([ {$unwind: "$actors" },</text:p>
      <text:p text:style-name="P6"><text:s/>{ $group: { _id: "$actors", // El ID del grupo será el nombre del actor titols: { $push: "$title" } } }, { $out: "actors" } // Crea o sobrescribe la colección 'actors' ]) </text:p>
      <text:p text:style-name="P2"> </text:p>
      <text:p text:style-name="P2">       6.- 6.1) La millor pel·lícula que s’ha fet mai és “Goffy e hijo”, per dos motius</text:p>
      <text:list text:style-name="L5">
        <text:list-item>
          <text:p text:style-name="P7">El primer motiu? Que surt Goffy</text:p>
        </text:list-item>
        <text:list-item>
          <text:p text:style-name="P7">El segon motiu? … que surt “e hijo”</text:p>
        </text:list-item>
      </text:list>
      <text:p text:style-name="Text_20_body"/>
      <text:p text:style-name="P2">Ves a <text:a xlink:type="simple" xlink:href="https://es.wikipedia.org/wiki/A_Goofy_Movie" text:style-name="Internet_20_link" text:visited-style-name="Visited_20_Internet_20_Link">https://es.wikipedia.org/wiki/A_Goofy_Movie</text:a></text:p>
      <text:p text:style-name="P2">i allà tindràs dades per tal de poder inserir aquesta pel·lícula.</text:p>
      <text:p text:style-name="P2">Fica-li com a dades: el títol, l’any, genre, i 3 protagonistes (inventats)</text:p>
      <text:p text:style-name="P2">Comprova que està inserida correctament amb la comanda corresponent</text:p>
      <text:p text:style-name="Text_20_body"/>
      <text:p text:style-name="P2">6.2) Modifica el document inserit per tal de garantir que té un rating de 10  (imdb.rating)</text:p>
      <text:p text:style-name="Text_20_body"/>
      <text:p text:style-name="P2">6.3) Esborra el registre anterior abans que la resta de la humanitat descobreixi aquest gran secret</text:p>
      <text:p text:style-name="Text_20_body"/>
      <text:p text:style-name="P2">7.- L’actor Henry Fonda ha participat en alguna pel·lícula nominada?. Digues quantes pel·lícules.</text:p>
      <text:p text:style-name="Text_20_body"/>
      <text:p text:style-name="P2">B- Importar, o fer servir, fitxer Paisos.Json sobre una base de dades en MongoDb </text:p>
      <text:p text:style-name="P2"><text:a xlink:type="simple" xlink:href="https://drive.google.com/file/d/1ZnpU4foDxerKwRpFQsdQMMXnzDzLhZmu/view?usp=drive_link" text:style-name="Internet_20_link" text:visited-style-name="Visited_20_Internet_20_Link">https://drive.google.com/file/d/1ZnpU4foDxerKwRpFQsdQMMXnzDzLhZmu/view?usp=drive_link</text:a></text:p>
      <text:p text:style-name="Text_20_body"/>
      <text:p text:style-name="P2">8.- De països que limiten (borders) amb més de 5 països, agafa els 3 que tinguin menys area. </text:p>
      <text:p text:style-name="P2">Mostra el nom (name.common), area i número de països limítrofs (borders).</text:p>
      <text:p text:style-name="Text_20_body"/>
      <text:p text:style-name="P2">9.- El vol saber el nom (name.common)  dels països  d’Europa més de 40.000 d’àrea que hi ha  a la BBDD</text:p>
      <text:p text:style-name="P2">Mostra únicament el nom del país i la població, ordenats alfabèticament. </text:p>
      <text:p text:style-name="Text_20_body"/>
      <text:p text:style-name="P2"><text:soft-page-break/>10 .- Un empresari espanyol, vol saber quins països d’Europa amb més de 1000 d’àrea estan a menys de 3000 quilòmetres, de distància de Spain (“name.common”).  Fes servir una variable per tenir les coordenades de Spain.</text:p>
      <text:p text:style-name="P2"/>
      <text:p text:style-name="P2"><text:bookmark text:name="docs-internal-guid-c81c2097-7fff-b77d-10ee-e0cf3530f669"/>let espanya = db.paisos.findOne({ "name.common": "Spain" }); db.paisos.aggregate([</text:p>
      <text:p text:style-name="P8">{$geoNear: {near: { type: "Point", coordinates:espanya.location.coordinates},</text:p>
      <text:p text:style-name="P8">distanceField: "dist.calculated",minDistance: 1, maxDistance: 3000000, spherical: true</text:p>
      <text:p text:style-name="P8">},},{$match: {area: {$gt:1000}}},]).pretty();</text:p>
      <text:p text:style-name="Text_20_body"><text:line-break/></text:p>
      <text:p text:style-name="Text_20_body"/>
      <text:p text:style-name="Text_20_body"/>
      <text:p text:style-name="P2">11.- Quins països hi ha entre el triangle format entre Italy, France, Germany. Solament el nom, please.</text:p>
      <text:p text:style-name="Text_20_body"/>
      <text:p text:style-name="P2">12.- Per cada regió i subregió, calcula el número de països i l’àrea total. Mostra també un array amb el nom dels països ordenats alfabèticament.</text:p>
      <text:p text:style-name="P2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9T17:33:59.126702600</meta:creation-date>
    <dc:date>2026-05-19T19:48:28.773427900</dc:date>
    <meta:editing-duration>PT1H44M59S</meta:editing-duration>
    <meta:editing-cycles>1</meta:editing-cycles>
    <meta:document-statistic meta:table-count="0" meta:image-count="0" meta:object-count="0" meta:page-count="3" meta:paragraph-count="54" meta:word-count="505" meta:character-count="3260" meta:non-whitespace-character-count="2746"/>
    <meta:generator>LibreOffice/25.8.6.2$Windows_X86_64 LibreOffice_project/b4b39682cd9868fa725bc664aff94278d315bd04</meta:generator>
  </office:meta>
</office:document-meta>
</file>